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3eea"/>
    </style:style>
    <style:style style:name="P2" style:family="paragraph" style:parent-style-name="Standard">
      <style:text-properties fo:color="#000000" loext:opacity="100%" style:font-name="Consolas" fo:font-size="11pt" style:font-size-asian="11pt"/>
    </style:style>
    <style:style style:name="P3" style:family="paragraph" style:parent-style-name="Standard">
      <style:text-properties fo:color="#000000" loext:opacity="100%" style:font-name="Consolas" fo:font-size="11pt" fo:font-weight="bold" style:font-size-asian="11pt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43eea" style:font-weight-asian="bold" style:font-weight-complex="bold"/>
    </style:style>
    <style:style style:name="P6" style:family="paragraph" style:parent-style-name="Standard">
      <style:text-properties officeooo:paragraph-rsid="00155fcc"/>
    </style:style>
    <style:style style:name="T1" style:family="text">
      <style:text-properties fo:color="#000000" loext:opacity="100%" style:font-name="Consolas" fo:font-size="11pt" style:font-size-asian="11pt"/>
    </style:style>
    <style:style style:name="T2" style:family="text">
      <style:text-properties fo:color="#000000" loext:opacity="100%" style:font-name="Consolas" fo:font-size="11pt" fo:font-weight="bold" style:font-size-asian="11pt" style:font-weight-asian="bold"/>
    </style:style>
    <style:style style:name="T3" style:family="text">
      <style:text-properties fo:color="#000000" loext:opacity="100%" style:font-name="Consolas" fo:font-size="11pt" fo:font-weight="bold" style:font-size-asian="11pt" style:font-weight-asian="bold" style:font-weight-complex="bold"/>
    </style:style>
    <style:style style:name="T4" style:family="text">
      <style:text-properties fo:color="#000000" loext:opacity="100%" style:font-name="Consolas" fo:font-size="11pt" fo:font-weight="bold" style:font-size-asian="11pt" style:font-weight-asian="bold" style:font-size-complex="8pt"/>
    </style:style>
    <style:style style:name="T5" style:family="text">
      <style:text-properties fo:color="#000000" loext:opacity="100%" style:font-name="Consolas" fo:font-size="11pt" fo:font-style="italic" fo:font-weight="bold" style:font-size-asian="11pt" style:font-style-asian="italic" style:font-weight-asian="bold"/>
    </style:style>
    <style:style style:name="T6" style:family="text">
      <style:text-properties fo:color="#000000" loext:opacity="100%" style:font-name="Consolas" fo:font-size="11pt" style:text-underline-style="solid" style:text-underline-width="auto" style:text-underline-color="font-color" style:font-size-asian="11pt"/>
    </style:style>
    <style:style style:name="T7" style:family="text">
      <style:text-properties fo:color="#000000" loext:opacity="100%" style:font-name="Consolas" fo:font-size="8pt" style:font-size-asian="8pt" style:font-size-complex="8pt"/>
    </style:style>
    <style:style style:name="T8" style:family="text">
      <style:text-properties fo:color="#000000" loext:opacity="100%" style:font-name="Consolas" fo:font-size="8pt" fo:font-weight="bold" style:font-size-asian="8pt" style:font-weight-asian="bold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📍</text:span><text:span text:style-name="T6"> SLIDE 1 - PAGE DE TITRE</text:span></text:p>
      <text:p text:style-name="Standard"><text:span text:style-name="T1"/></text:p>
      <text:p text:style-name="Standard"><text:span text:style-name="T1">🎤 "</text:span><text:span text:style-name="T2">Bonjour à tous. Je m'appelle Illia Gromov. Aujourd'hui je vous présente le Web3 — une technologie qui révolutionne Internet.</text:span></text:p>
      <text:p text:style-name="Standard"><text:span text:style-name="T2">Merci de votre attention</text:span><text:span text:style-name="T1">."</text:span></text:p>
      <text:p text:style-name="Standard"/>
      <text:p text:style-name="Standard"><text:span text:style-name="T1">📍</text:span><text:span text:style-name="T6"> SLIDE 2 - LE PLAN</text:span></text:p>
      <text:p text:style-name="Standard"><text:span text:style-name="T1"/></text:p>
      <text:p text:style-name="Standard"><text:span text:style-name="T1">🎤 </text:span><text:span text:style-name="T2">Nous verrons:</text:span></text:p>
      <text:p text:style-name="Standard"><text:span text:style-name="T2">D'abord: qu'est-ce que le Web3?</text:span></text:p>
      <text:p text:style-name="Standard"><text:span text:style-name="T2">Ensuite: l'évolution du Web.</text:span></text:p>
      <text:p text:style-name="Standard"><text:span text:style-name="T2">Puis: les technologies clés.</text:span></text:p>
      <text:p text:style-name="Standard"><text:span text:style-name="T2">Après: avantages et risques.</text:span></text:p>
      <text:p text:style-name="Standard"><text:span text:style-name="T2">Et les opportunités pour nous, développeurs.</text:span></text:p>
      <text:p text:style-name="Standard"><text:span text:style-name="T2"/></text:p>
      <text:p text:style-name="P1"><text:span text:style-name="T1">📍 </text:span><text:span text:style-name="T6">SLIDE 3 - INTRODUCTION EN FRANÇAIS</text:span></text:p>
      <text:p text:style-name="Standard"><text:span text:style-name="T1"/></text:p>
      <text:p text:style-name="Standard"><text:span text:style-name="T2">🎤</text:span><text:span text:style-name="T1"> </text:span><text:span text:style-name="T2">Pour bien commencer, je vais vous donner une définition simple</text:span></text:p>
      <text:p text:style-name="Standard"><text:span text:style-name="T2">et claire du Web3. </text:span><text:span text:style-name="T5">Web3 est</text:span><text:span text:style-name="T2"> une nouvelle version d'Internet basée sur la technologie blockchain, où les utilisateurs contrôlent leurs propres données</text:span></text:p>
      <text:p text:style-name="Standard"><text:span text:style-name="T2">et leurs actifs numériques, sans intermédiaires centralisés.</text:span></text:p>
      <text:p text:style-name="Standard"><text:span text:style-name="T2">Maintenant, explorons ça plus en détail.</text:span></text:p>
      <text:p text:style-name="Standard"><text:span text:style-name="T2"/></text:p>
      <text:p text:style-name="Standard"><text:span text:style-name="T2">📍</text:span><text:span text:style-name="T1"> </text:span><text:span text:style-name="T6">SLIDE 4 - QU'EST-CE QUE LE WEB3?</text:span></text:p>
      <text:p text:style-name="Standard"><text:span text:style-name="T2"/></text:p>
      <text:p text:style-name="Standard"><text:span text:style-name="T2">🎤</text:span><text:span text:style-name="T1"> </text:span><text:span text:style-name="T2">les QUATRE CARACTÉRISTIQUES PRINCIPALES du Web3.</text:span></text:p>
      <text:p text:style-name="P2"/>
      <text:p text:style-name="Standard"><text:span text:style-name="T2">UN: Internet décentralisé.</text:span></text:p>
      <text:p text:style-name="Standard"><text:span text:style-name="T2">Pas de serveurs centralisés. Un réseau de milliers d'ordinateurs.</text:span></text:p>
      <text:p text:style-name="P2"/>
      <text:p text:style-name="Standard"><text:span text:style-name="T2">DEUX: Basé sur blockchain.</text:span></text:p>
      <text:p text:style-name="Standard"><text:span text:style-name="T2">Un registre numérique partagé. Impossible à modifier.</text:span></text:p>
      <text:p text:style-name="P2"/>
      <text:p text:style-name="Standard"><text:span text:style-name="T2">TROIS: Contrôlé par utilisateurs.</text:span></text:p>
      <text:p text:style-name="Standard"><text:span text:style-name="T2">Vos données vous appartiennent.</text:span></text:p>
      <text:p text:style-name="P2"/>
      <text:p text:style-name="Standard"><text:span text:style-name="T2">QUATRE: Pas de serveur central.</text:span></text:p>
      <text:p text:style-name="Standard"><text:span text:style-name="T2">Si un serveur tombe, le réseau continue.</text:span></text:p>
      <text:p text:style-name="Standard"><text:span text:style-name="T2"/></text:p>
      <text:p text:style-name="Standard"><text:span text:style-name="T1"/></text:p>
      <text:p text:style-name="Standard"><text:span text:style-name="T1">📍 </text:span><text:span text:style-name="T6">SLIDE 5 - L'ÉVOLUTION DU WEB (Web1 → Web2 → Web3)</text:span></text:p>
      <text:p text:style-name="Standard"/>
      <text:p text:style-name="Standard"><text:span text:style-name="T1">🎤 </text:span><text:span text:style-name="T3">Pour bien comprendre le Web3, il faut comprendre l'évolution</text:span></text:p>
      <text:p text:style-name="P4"><text:span text:style-name="T1">d'Internet depuis le début.</text:span></text:p>
      <text:p text:style-name="P3"/>
      <text:p text:style-name="P4"><text:span text:style-name="T1">WEB1 - LES ANNÉES 1990.</text:span></text:p>
      <text:p text:style-name="P4"><text:span text:style-name="T1">À cette époque, Internet était très simple et basique. Les sites web étaient juste des pages HTML statiques. Vous pouviez seulement LIRE du contenu.</text:span></text:p>
      <text:p text:style-name="P3"/>
      <text:p text:style-name="P4"><text:span text:style-name="T1">WEB2 - DEPUIS 2004 JUSQU'À AUJOURD'HUI.</text:span></text:p>
      <text:p text:style-name="P4"><text:span text:style-name="T1">Avec le Web2, la situation a changé. Nous pouvons non seulement LIRE, mais aussi ÉCRIRE. Facebook, Twitter, Instagram, YouTube - ce sont des réseaux sociaux. Vous créez un compte, vous publiez des photos, des vidéos, des commentaires. Vous interagissez avec les autres.</text:span></text:p>
      <text:p text:style-name="P3"/>
      <text:p text:style-name="P5"><text:span text:style-name="T1">MAIS:grandes entreprises contrôlent TOUTES vos données.</text:span></text:p>
      <text:p text:style-name="P5"><text:soft-page-break/><text:span text:style-name="T1">WEB3 - 2020 ET APRÈS.</text:span></text:p>
      <text:p text:style-name="P4"><text:span text:style-name="T1">avec le Web3, c'est un changement radical. Vous pouvez LIRE, ÉCRIRE, ET POSSÉDER. Vos données, c'est VÔTRE. Complètement. Vous décidez qui peut y accéder et qui ne peut pas.</text:span></text:p>
      <text:p text:style-name="Standard"/>
      <text:p text:style-name="Standard"/>
      <text:p text:style-name="Standard"><text:span text:style-name="T1">📍</text:span><text:span text:style-name="T6"> SLIDE 6 - LA BLOCKCHAIN</text:span></text:p>
      <text:p text:style-name="Standard"><text:span text:style-name="T1">🎤 </text:span><text:span text:style-name="T2">parlons de la BLOCKCHAIN - la technologie LA PLUS IMPORTANTE du Web3.</text:span></text:p>
      <text:p text:style-name="P2"/>
      <text:p text:style-name="Standard"><text:span text:style-name="T2">Imaginez un grand LIVRE où l'on enregistre toutes les evenements.</text:span></text:p>
      <text:p text:style-name="Standard"><text:span text:style-name="T2">Mais les deux grandes différences:</text:span></text:p>
      <text:p text:style-name="P2"/>
      <text:p text:style-name="Standard"><text:span text:style-name="T2">PREMIÈRE DIFFÉRENCE:</text:span></text:p>
      <text:p text:style-name="Standard"><text:span text:style-name="T2">Ce livre n'est pas stocké dans UN seul endroit.</text:span></text:p>
      <text:p text:style-name="Standard"><text:span text:style-name="T2">Il est copié sur MILLIERS d'ordinateurs à travers le monde.</text:span></text:p>
      <text:p text:style-name="Standard"><text:span text:style-name="T2">Chaque ordinateur a une copie complète du livre.</text:span></text:p>
      <text:p text:style-name="Standard"><text:span text:style-name="T2">Pour la sécurité et la transparence.</text:span></text:p>
      <text:p text:style-name="P2"/>
      <text:p text:style-name="Standard"><text:span text:style-name="T2">Si quelqu'un essaie d'écrire quelque chose d'incorrect sur son ordinateur,</text:span></text:p>
      <text:p text:style-name="Standard"><text:span text:style-name="T2">les autres ordinateurs le verront et rejetteront le changement.</text:span></text:p>
      <text:p text:style-name="P2"/>
      <text:p text:style-name="P2"/>
      <text:p text:style-name="Standard"><text:span text:style-name="T2">DEUXIÈME DIFFÉRENCE: C'est impossible à modifier.</text:span></text:p>
      <text:p text:style-name="Standard"><text:span text:style-name="T2">Quand vous enregistrez une transaction, elle est</text:span></text:p>
      <text:p text:style-name="Standard"><text:span text:style-name="T2">CRYPTOGRAPHIQUEMENT VERROUILLÉE.</text:span></text:p>
      <text:p text:style-name="Standard"><text:span text:style-name="T2">Vous ne pouvez pas le modifier. Personne ne peut le modifier.</text:span></text:p>
      <text:p text:style-name="P2"/>
      <text:p text:style-name="Standard"><text:span text:style-name="T2">Les ordinateurs (les NŒUDS) sont liés en une CHAÎNE.</text:span></text:p>
      <text:p text:style-name="Standard"><text:span text:style-name="T2">Chaque bloc contient des données sur les transactions.</text:span></text:p>
      <text:p text:style-name="Standard"><text:span text:style-name="T2">Chaque nouveau bloc lave une référence au bloc précédent.</text:span></text:p>
      <text:p text:style-name="Standard"><text:span text:style-name="T2">C'est comme une chaîne - si vous essayez de retirer</text:span></text:p>
      <text:p text:style-name="Standard"><text:span text:style-name="T2">un maillon, toute la chaîne se casse.</text:span></text:p>
      <text:p text:style-name="P2"/>
      <text:p text:style-name="Standard"><text:span text:style-name="T2">C'est la confiance SUR LA TECHNOLOGIE, pas sur les institutions.</text:span></text:p>
      <text:p text:style-name="Standard"/>
      <text:p text:style-name="Standard"/>
      <text:p text:style-name="Standard"><text:span text:style-name="T1">📍 </text:span><text:span text:style-name="T6">SLIDE 7 - LES CRYPTOMONNAIES</text:span></text:p>
      <text:p text:style-name="Standard"/>
      <text:p text:style-name="Standard"><text:span text:style-name="T1">🎤 </text:span><text:span text:style-name="T2">Maintenant, qu'est-ce que les cryptomonnaies?</text:span></text:p>
      <text:p text:style-name="P2"/>
      <text:p text:style-name="Standard"><text:span text:style-name="T2">Les cryptomonnaies - <text:s/>sont des monnaies qui existent</text:span></text:p>
      <text:p text:style-name="Standard"><text:span text:style-name="T2">complètement dans le monde numérique et sont basées sur la blockchain.</text:span></text:p>
      <text:p text:style-name="P2"/>
      <text:p text:style-name="Standard"><text:span text:style-name="T2">La différence FONDAMENTALE avec les monnaies traditionnelles:</text:span></text:p>
      <text:p text:style-name="P2"/>
      <text:p text:style-name="Standard"><text:span text:style-name="T2">Quand vous avez des euros en banque, c'est LA BANQUE qui contrôle.</text:span></text:p>
      <text:p text:style-name="Standard"><text:span text:style-name="T2">(taux d'intérêt ,la valeur ,Ils peuvent geler votre compte)</text:span></text:p>
      <text:p text:style-name="P2"/>
      <text:p text:style-name="Standard"><text:span text:style-name="T2">Avec les cryptomonnaies, Il n'y a PAS D'INSTITUTION qui contrôle.</text:span></text:p>
      <text:p text:style-name="Standard"><text:span text:style-name="T2">La monnaie est contrôlée par un RÉSEAU DISTRIBUÉ d'ordinateurs.</text:span></text:p>
      <text:p text:style-name="Standard"><text:span text:style-name="T2">Et par les UTILISATEURS.</text:span></text:p>
      <text:p text:style-name="P2"/>
      <text:p text:style-name="Standard"><text:span text:style-name="T2">Trois exemple</text:span></text:p>
      <text:p text:style-name="Standard"><text:span text:style-name="T2">Bitcoin</text:span></text:p>
      <text:p text:style-name="Standard"><text:span text:style-name="T2">Ethereum</text:span></text:p>
      <text:p text:style-name="Standard"><text:span text:style-name="T2">Solana</text:span></text:p>
      <text:p text:style-name="Standard"><text:soft-page-break/><text:span text:style-name="T1">📍 </text:span><text:span text:style-name="T6">SLIDE 8 - LES NFT</text:span></text:p>
      <text:p text:style-name="Standard"><text:span text:style-name="T1">🎤 </text:span><text:span text:style-name="T2">Maintenant, quelque chose de très intéressant: les NFT.</text:span></text:p>
      <text:p text:style-name="P2"/>
      <text:p text:style-name="Standard"><text:span text:style-name="T2">NFT signifie Non-Fungible Token - un TOKEN qui ne peut pas être remplacé.</text:span></text:p>
      <text:p text:style-name="P2"/>
      <text:p text:style-name="Standard"><text:span text:style-name="T2">Un euro est fongible - je peux l'échanger avec n'importe quel autre euro, ils sont identiques.</text:span></text:p>
      <text:p text:style-name="Standard"><text:span text:style-name="T2">Vous voyez une photo. Vous la copiez? 1 million de copies identiques.</text:span></text:p>
      <text:p text:style-name="P2"/>
      <text:p text:style-name="Standard"><text:span text:style-name="T2">Avec NFT VOUS avez le certificat original.</text:span></text:p>
      <text:p text:style-name="Standard"><text:span text:style-name="T2">C'est comme l'art physique — je peux copier une photo de la</text:span></text:p>
      <text:p text:style-name="Standard"><text:span text:style-name="T2">Joconde, mais l'original c'est au Louvre.</text:span></text:p>
      <text:p text:style-name="P2"/>
      <text:p text:style-name="Standard"><text:span text:style-name="T2">Utilisations: art, jeux vidéo, musique, collectibles.</text:span></text:p>
      <text:p text:style-name="Standard"><text:span text:style-name="T2">Ce certificat est gravé dans la blockchain.</text:span></text:p>
      <text:p text:style-name="Standard"/>
      <text:p text:style-name="Standard"/>
      <text:p text:style-name="Standard"><text:span text:style-name="T1">📍</text:span><text:span text:style-name="T6"> SLIDE 9 - LES SMART CONTRACTS</text:span></text:p>
      <text:p text:style-name="Standard"><text:span text:style-name="T1">🎤 </text:span><text:span text:style-name="T2">Suivant: les SMART CONTRACTS. Les contrats intelligents.</text:span></text:p>
      <text:p text:style-name="Standard"><text:span text:style-name="T1"><text:s/></text:span><text:span text:style-name="T2">la technologie SIMPLIFIE vraiment les choses.</text:span></text:p>
      <text:p text:style-name="P2"/>
      <text:p text:style-name="Standard"><text:span text:style-name="T2">AVEC LES SMART CONTRACTS:</text:span></text:p>
      <text:p text:style-name="P2"/>
      <text:p text:style-name="Standard"><text:span text:style-name="T2">Un smart contract est un programme informatique</text:span></text:p>
      <text:p text:style-name="Standard"><text:span text:style-name="T2">qui s'exécute automatiquement sur la blockchain lorsque certaines</text:span></text:p>
      <text:p text:style-name="Standard"><text:span text:style-name="T2">conditions sont remplies, sans intervention humaine.</text:span></text:p>
      <text:p text:style-name="P2"/>
      <text:p text:style-name="Standard"><text:span text:style-name="T2">assurance, prêts, salaires — tout peut être automatisé.</text:span></text:p>
      <text:p text:style-name="P2"/>
      <text:p text:style-name="Standard"><text:span text:style-name="T2">CONTRATS DE TRAVAIL:</text:span></text:p>
      <text:p text:style-name="P2"/>
      <text:p text:style-name="Standard"><text:span text:style-name="T2">"SI les heures travaillées sont validées,</text:span></text:p>
      <text:p text:style-name="Standard"><text:span text:style-name="T2">ALORS le salaire est versé automatiquement."</text:span></text:p>
      <text:p text:style-name="Standard"><text:span text:style-name="T1"/></text:p>
      <text:p text:style-name="Standard"><text:span text:style-name="T1"/></text:p>
      <text:p text:style-name="Standard"><text:span text:style-name="T1">📍 </text:span><text:span text:style-name="T6">SLIDE 10 - LA DeFi (FINANCE DÉCENTRALISÉE)</text:span></text:p>
      <text:p text:style-name="Standard"><text:span text:style-name="T1">🎤 </text:span><text:span text:style-name="T2">DeFi = Finance Décentralisée. Services bancaires SANS banques.</text:span></text:p>
      <text:p text:style-name="Standard"><text:span text:style-name="T2">Aujourd'hui: crédit? Banque. 2 semaines. 5-10% intérêt.</text:span></text:p>
      <text:p text:style-name="P2"/>
      <text:p text:style-name="Standard"><text:span text:style-name="T2">DeFi: plateforme Aave. Crédit en SECONDES 24/7.</text:span></text:p>
      <text:p text:style-name="P2"/>
      <text:p text:style-name="Standard"><text:span text:style-name="T2">Vous êtes prêteur? 10 000€ → 5-10% intérêt AUTOMATIQUE.</text:span></text:p>
      <text:p text:style-name="P2"/>
      <text:p text:style-name="Standard"><text:span text:style-name="T2">plateformes:</text:span></text:p>
      <text:p text:style-name="P2"/>
      <text:p text:style-name="Standard"><text:span text:style-name="T2">Uniswap — échange crypto</text:span></text:p>
      <text:p text:style-name="Standard"><text:span text:style-name="T2">Aave — prêts décentralisés</text:span></text:p>
      <text:p text:style-name="Standard"><text:span text:style-name="T1"/></text:p>
      <text:p text:style-name="Standard"><text:span text:style-name="T1"/></text:p>
      <text:p text:style-name="Standard"><text:span text:style-name="T1">📍 </text:span><text:span text:style-name="T6">SLIDE 11 - AVANTAGES DU WEB3</text:span></text:p>
      <text:p text:style-name="Standard"><text:span text:style-name="T1">🎤 </text:span><text:span text:style-name="T2">Quatre avantages:</text:span></text:p>
      <text:p text:style-name="P2"/>
      <text:p text:style-name="Standard"><text:span text:style-name="T2">SÉCURITÉ — Données cryptées, distribuées.</text:span></text:p>
      <text:p text:style-name="Standard"><text:span text:style-name="T2">Impossible à pirater.</text:span></text:p>
      <text:p text:style-name="P2"/>
      <text:p text:style-name="Standard"><text:span text:style-name="T2">PROPRIÉTÉ — Vous contrôlez vos données.</text:span></text:p>
      <text:p text:style-name="Standard"><text:soft-page-break/><text:span text:style-name="T2">Pas comme Facebook qui vous utilise comme produit.</text:span></text:p>
      <text:p text:style-name="P2"/>
      <text:p text:style-name="Standard"><text:span text:style-name="T2">ACCESSIBILITÉ — Juste téléphone + Internet.</text:span></text:p>
      <text:p text:style-name="Standard"><text:span text:style-name="T2">Accès global.</text:span></text:p>
      <text:p text:style-name="P2"/>
      <text:p text:style-name="Standard"><text:span text:style-name="T2">PAS DE CENSURE — Réseau distribué.</text:span></text:p>
      <text:p text:style-name="Standard"><text:span text:style-name="T2">Impossible à censurer.</text:span></text:p>
      <text:p text:style-name="P2"/>
      <text:p text:style-name="Standard"><text:span text:style-name="T2">Web3 = plus sûr, plus libre, plus accessible.</text:span></text:p>
      <text:p text:style-name="Standard"><text:span text:style-name="T1"/></text:p>
      <text:p text:style-name="Standard"><text:span text:style-name="T1">📍</text:span><text:span text:style-name="T6"> SLIDE 12 - INCONVÉNIENTS ET RISQUES</text:span></text:p>
      <text:p text:style-name="Standard"><text:span text:style-name="T1">🎤 </text:span><text:span text:style-name="T2">Je crois au Web3, mais je dois être honnête - il y a de vrais</text:span></text:p>
      <text:p text:style-name="P2"/>
      <text:p text:style-name="Standard"><text:span text:style-name="T2">problèmes.</text:span></text:p>
      <text:p text:style-name="P2"/>
      <text:p text:style-name="Standard"><text:span text:style-name="T2">ÉNERGIE — Bitcoin consomme beaucoup.</text:span></text:p>
      <text:p text:style-name="Standard"><text:span text:style-name="T2">MAIS: Ethereum a réduit de 99.95%. Solana 99.99%.</text:span></text:p>
      <text:p text:style-name="P2"/>
      <text:p text:style-name="Standard"><text:span text:style-name="T2">VOLATILITÉ — Bitcoin peut perdre 50% en une semaine.</text:span></text:p>
      <text:p text:style-name="P2"/>
      <text:p text:style-name="Standard"><text:span text:style-name="T2">COMPLEXITÉ — Difficile pour personnes non tech.</text:span></text:p>
      <text:p text:style-name="P2"/>
      <text:p text:style-name="Standard"><text:span text:style-name="T2">ARNAQUES — Arnaqueurs partout. Vous perdez tout.</text:span></text:p>
      <text:p text:style-name="Standard"><text:span text:style-name="T2">Impossible à récupérer.</text:span></text:p>
      <text:p text:style-name="P2"/>
      <text:p text:style-name="Standard"><text:span text:style-name="T2">RÉGULATION — Gouvernements ne savent pas comment réguler.</text:span></text:p>
      <text:p text:style-name="P2"/>
      <text:p text:style-name="P2"/>
      <text:p text:style-name="Standard"><text:span text:style-name="T2">MAIS - et c'est important - ces problèmes se RÉSOLVENT.</text:span></text:p>
      <text:p text:style-name="Standard"><text:span text:style-name="T2">La technologie s'améliore tous les jours.</text:span></text:p>
      <text:p text:style-name="Standard"><text:span text:style-name="T2">Les réglementations se clarifient.</text:span></text:p>
      <text:p text:style-name="Standard"><text:span text:style-name="T2">Les interfaces deviennent plus faciles.</text:span></text:p>
      <text:p text:style-name="P2"/>
      <text:p text:style-name="Standard"><text:span text:style-name="T2">Donc les risques sont RÉELS MAINTENANT. Mais ils ne seront pas éternels.</text:span></text:p>
      <text:p text:style-name="Standard"><text:span text:style-name="T1"/></text:p>
      <text:p text:style-name="Standard"><text:span text:style-name="T1"/></text:p>
      <text:p text:style-name="Standard"><text:span text:style-name="T1">📍</text:span><text:span text:style-name="T6"> SLIDE 13 - WEB3 ET LE DÉVELOPPEMENT WEB</text:span></text:p>
      <text:p text:style-name="Standard"><text:span text:style-name="T1">🎤 </text:span><text:span text:style-name="T2">Le Web3 offre aux développeurs web:</text:span></text:p>
      <text:p text:style-name="P2"/>
      <text:p text:style-name="Standard"><text:span text:style-name="T2">✅ Nouveaux langages à apprendre</text:span></text:p>
      <text:p text:style-name="Standard"><text:span text:style-name="T2">✅ Nouveaux outils intéressants</text:span></text:p>
      <text:p text:style-name="Standard"><text:span text:style-name="T2">✅ Nouveaux métiers bien payés</text:span></text:p>
      <text:p text:style-name="Standard"><text:span text:style-name="T2">✅ Une véritable opportunité de carrière</text:span></text:p>
      <text:p text:style-name="Standard"><text:span text:style-name="T1"/></text:p>
      <text:p text:style-name="Standard"><text:span text:style-name="T1"/></text:p>
      <text:p text:style-name="Standard"><text:span text:style-name="T1">📍 </text:span><text:span text:style-name="T6">SLIDE 14 - CONCLUSION</text:span></text:p>
      <text:p text:style-name="Standard"><text:span text:style-name="T1">🎤 </text:span><text:span text:style-name="T2">Web3 c'est une VRAIE RÉVOLUTION.</text:span></text:p>
      <text:p text:style-name="P2"/>
      <text:p text:style-name="Standard"><text:span text:style-name="T2">Plus sécurisé. Plus libre. Opportunités exceptionnelles.</text:span></text:p>
      <text:p text:style-name="P2"/>
      <text:p text:style-name="P2"/>
      <text:p text:style-name="Standard"><text:span text:style-name="T2">Et le plus important:</text:span></text:p>
      <text:p text:style-name="Standard"><text:span text:style-name="T2">Le Web3 n'est pas l'avenir.</text:span></text:p>
      <text:p text:style-name="Standard"><text:span text:style-name="T2">Le Web3 EST LE PRÉSENT.</text:span></text:p>
      <text:p text:style-name="P2"/>
      <text:p text:style-name="P6"><text:span text:style-name="T1">📍 </text:span><text:span text:style-name="T6">SLIDE 15 – REMERCIEMENTS</text:span><text:span text:style-name="T1"> </text:span><text:span text:style-name="T7">🎤 </text:span><text:span text:style-name="T8">Merci beaucoup de votre attention. Je suis à votre disposition..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21T21:20:24.499000000</dc:date>
    <meta:editing-duration>PT10M30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138" meta:word-count="1016" meta:character-count="6462" meta:non-whitespace-character-count="5566"/>
  </office:meta>
</office:document-meta>
</file>